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DE000001B10B5E5A9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line-height="100%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 loext:padding="0cm" loext:border="none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2-use-case-dtaill--visualiser-le-tableau-de-bord"/>Use Case détaillé : Visualiser le tableau de bord</text:h>
      <text:p text:style-name="P2"><text:span text:style-name="Strong_20_Emphasis"><text:span text:style-name="T1">1. Identification</text:span></text:span><text:span text:style-name="T2"><text:line-break/></text:span><text:span text:style-name="Strong_20_Emphasis"><text:span text:style-name="T1">UC-ID :</text:span></text:span><text:span text:style-name="T2"> UC-10<text:line-break/></text:span><text:span text:style-name="Strong_20_Emphasis"><text:span text:style-name="T1">Nom :</text:span></text:span><text:span text:style-name="T2"> Visualiser le tableau de bord avec KPIs et graphiques<text:line-break/></text:span><text:span text:style-name="Strong_20_Emphasis"><text:span text:style-name="T1">Version :</text:span></text:span><text:span text:style-name="T2"> 1.0<text:line-break/></text:span><text:span text:style-name="Strong_20_Emphasis"><text:span text:style-name="T1">Date :</text:span></text:span><text:span text:style-name="T2"> 05/05/2026<text:line-break/></text:span><text:span text:style-name="Strong_20_Emphasis"><text:span text:style-name="T1">Auteur(s) :</text:span></text:span><text:span text:style-name="T2"> [Ton Nom]</text:span></text:p>
      <text:p text:style-name="P2"><text:span text:style-name="Strong_20_Emphasis"><text:span text:style-name="T1">2. Contexte</text:span></text:span><text:span text:style-name="T2"><text:line-break/></text:span><text:span text:style-name="Strong_20_Emphasis"><text:span text:style-name="T1">Acteur principal :</text:span></text:span><text:span text:style-name="T2"> Administrateur / Enseignant<text:line-break/></text:span><text:span text:style-name="Strong_20_Emphasis"><text:span text:style-name="T1">Acteurs secondaires :</text:span></text:span><text:span text:style-name="T2"> Aucun<text:line-break/></text:span><text:span text:style-name="Strong_20_Emphasis"><text:span text:style-name="T1">Objectif :</text:span></text:span><text:span text:style-name="T2"> Afficher une vue d'ensemble synthétique (statistiques, graphiques, alertes, prochaines visites) de l'état des stages.<text:line-break/></text:span><text:span text:style-name="Strong_20_Emphasis"><text:span text:style-name="T1">Périmètre :</text:span></text:span><text:span text:style-name="T2"> Page d'accueil (</text:span><text:span text:style-name="Source_20_Text"><text:span text:style-name="T1">/</text:span></text:span><text:span text:style-name="T2">)</text:span></text:p>
      <text:p text:style-name="P2"><text:span text:style-name="Strong_20_Emphasis"><text:span text:style-name="T1">3. Conditions</text:span></text:span><text:span text:style-name="T2"><text:line-break/></text:span><text:span text:style-name="Strong_20_Emphasis"><text:span text:style-name="T1">Préconditions :</text:span></text:span><text:span text:style-name="T2"> L'utilisateur doit être connecté et posséder un compte actif. Des données de stages et visites doivent exister en base.<text:line-break/></text:span><text:span text:style-name="Strong_20_Emphasis"><text:span text:style-name="T1">Déclencheur :</text:span></text:span><text:span text:style-name="T2"> Connexion réussie ou clic sur "Accueil" dans le menu.<text:line-break/></text:span><text:span text:style-name="Strong_20_Emphasis"><text:span text:style-name="T1">Postconditions (succès) :</text:span></text:span><text:span text:style-name="T2"> Affichage des données (KPIs, graphiques, alertes, prochaines visites) filtrées selon le rôle.<text:line-break/></text:span><text:span text:style-name="Strong_20_Emphasis"><text:span text:style-name="T1">Postconditions (échec) :</text:span></text:span><text:span text:style-name="T2"> Message d'erreur (si BDD indisponible) ou redirection vers login (si session expirée).</text:span></text:p>
      <text:p text:style-name="P2"><text:span text:style-name="Strong_20_Emphasis"><text:span text:style-name="T1">4. Données &amp; règles de gestion</text:span></text:span><text:span text:style-name="T2"><text:line-break/>Données manipulées (champs) :</text:span></text:p>
      <text:list text:style-name="L1">
        <text:list-item>
          <text:p text:style-name="P3">Total étudiants (par filière SLAM/SISR)</text:p>
        </text:list-item>
        <text:list-item>
          <text:p text:style-name="P3">Stages en cours</text:p>
        </text:list-item>
        <text:list-item>
          <text:p text:style-name="P3">Entreprises partenaires</text:p>
        </text:list-item>
        <text:list-item>
          <text:p text:style-name="P3">Visites à planifier</text:p>
        </text:list-item>
        <text:list-item>
          <text:p text:style-name="P3">Graphiques : Répartition filière (camembert), Évolution (barres)</text:p>
        </text:list-item>
      </text:list>
      <text:p text:style-name="P4">Règles de gestion :</text:p>
      <text:list text:style-name="L2">
        <text:list-item>
          <text:p text:style-name="P5">R1 : Si l'acteur est "Administrateur", les données affichées (prochaines visites, etc.) couvrent l'intégralité des stages.</text:p>
        </text:list-item>
        <text:list-item>
          <text:p text:style-name="P5">R2 : Si l'acteur est "Enseignant", la liste des "prochaines visites" ne montre que celles où il est affecté en tant que "professeur visiteur".</text:p>
        </text:list-item>
      </text:list>
      <text:p text:style-name="P2"><text:span text:style-name="Strong_20_Emphasis"><text:span text:style-name="T1">5. Scénarios</text:span></text:span><text:span text:style-name="T2"><text:line-break/>Scénario nominal (étapes numérotées) :</text:span></text:p>
      <text:list text:style-name="L3">
        <text:list-item>
          <text:p text:style-name="P6"><text:span text:style-name="T2">L'utilisateur se connecte ou accède à la route de la page d'accueil (</text:span><text:span text:style-name="Source_20_Text"><text:span text:style-name="T1">/</text:span></text:span><text:span text:style-name="T2">).</text:span></text:p>
        </text:list-item>
        <text:list-item>
          <text:p text:style-name="P7">Le système récupère le rôle de l'utilisateur.</text:p>
        </text:list-item>
        <text:list-item>
          <text:p text:style-name="P7">Le système exécute les requêtes de comptage et de récupération des données, en appliquant les filtres appropriés (règle R2 si enseignant).</text:p>
        </text:list-item>
        <text:list-item>
          <text:p text:style-name="P7">Le système génère la vue contenant les KPIs, les alertes, les graphiques et le tableau des prochaines visites.</text:p>
        </text:list-item>
        <text:list-item>
          <text:p text:style-name="P7">L'utilisateur visualise son tableau de bord.</text:p>
        </text:list-item>
      </text:list>
      <text:p text:style-name="P4"><text:soft-page-break/>Exceptions / erreurs :</text:p>
      <text:list text:style-name="L4">
        <text:list-item>
          <text:p text:style-name="P8">E1 : Utilisateur non connecté : Redirection vers la page de login.</text:p>
        </text:list-item>
        <text:list-item>
          <text:p text:style-name="P8">E2 : Base de données indisponible : Affichage d'une page d'erreur 500 générique (gérée par Symfony).</text:p>
        </text:list-item>
      </text:list>
      <text:p text:style-name="P2"><text:span text:style-name="Strong_20_Emphasis"><text:span text:style-name="T1">6. Critères d'acceptation</text:span></text:span></text:p>
      <text:list text:style-name="L5">
        <text:list-item>
          <text:p text:style-name="P9">CA1 : Given qu'un Administrateur est connecté, When il consulte la page d'accueil, Then il voit les 4 KPIs globaux, les graphiques et toutes les prochaines visites prévues.</text:p>
        </text:list-item>
        <text:list-item>
          <text:p text:style-name="P9">CA2 : Given qu'un Enseignant est connecté, When il consulte la page d'accueil, Then il voit la liste restreinte de SES prochaines visites dans le tableau.</text:p>
        </text:list-item>
      </text:list>
      <text:p text:style-name="P2"><text:span text:style-name="Strong_20_Emphasis"><text:span text:style-name="T1">7. Maquettes associées</text:span></text:span></text:p>
      <text:p text:style-name="P10"><draw:frame draw:style-name="fr1" draw:name="Image1" text:anchor-type="as-char" svg:width="17.463cm" svg:height="7.646cm" draw:z-index="0"><draw:image xlink:href="Pictures/10000001000003DE000001B10B5E5A95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8:41:32.198060500</meta:creation-date>
    <dc:date>2026-05-05T18:42:24.148465100</dc:date>
    <meta:editing-duration>PT52S</meta:editing-duration>
    <meta:editing-cycles>1</meta:editing-cycles>
    <meta:document-statistic meta:table-count="0" meta:image-count="1" meta:object-count="0" meta:page-count="2" meta:paragraph-count="27" meta:word-count="386" meta:character-count="2435" meta:non-whitespace-character-count="2090"/>
    <meta:generator>LibreOffice/25.8.5.2$Windows_X86_64 LibreOffice_project/9c8b85f387cc00a89945a79c9e6239f32e450ac2</meta:generator>
  </office:meta>
</office:document-meta>
</file>