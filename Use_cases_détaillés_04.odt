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00000032BABF4E4E5.png" manifest:media-type="image/png"/>
  <manifest:file-entry manifest:full-path="Pictures/10000001000007610000024B06459EEA.png" manifest:media-type="image/png"/>
  <manifest:file-entry manifest:full-path="Pictures/10000001000003B100000309C2F5155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1" style:family="paragraph" style:parent-style-name="Text_20_body" style:list-style-name="L8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9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c04--grer-les-stages"/>UC‑04 – Gérer les stages</text:h>
      <text:h text:style-name="P2" text:outline-level="2"><text:bookmark text:name="1-identification"/>1. Identification</text:h>
      <text:p text:style-name="P3">UC‑ID : UC‑04<text:line-break/>Nom : Gérer les stages<text:line-break/>Version : 1.0<text:line-break/>Date : 05/05/2026<text:line-break/>Auteur(s) : Jordan K.</text:p>
      <text:h text:style-name="P2" text:outline-level="2"><text:bookmark text:name="2-contexte"/>2. Contexte</text:h>
      <text:p text:style-name="P3">Acteur principal : Administrateur<text:line-break/>Objectif : Créer/modifier les stages des étudiants en les liant à une entreprise.<text:line-break/>Périmètre : Menu “Stages” + formulaires.</text:p>
      <text:h text:style-name="P2" text:outline-level="2"><text:bookmark text:name="3-conditions"/>3. Conditions</text:h>
      <text:p text:style-name="P3">Préconditions :</text:p>
      <text:list text:style-name="L1">
        <text:list-item>
          <text:p text:style-name="P4">Étudiants et entreprises existent.</text:p>
        </text:list-item>
        <text:list-item>
          <text:p text:style-name="P4">L’utilisateur est Admin.</text:p>
        </text:list-item>
      </text:list>
      <text:p text:style-name="P3">Déclencheur :</text:p>
      <text:list text:style-name="L2">
        <text:list-item>
          <text:p text:style-name="P5">Clic sur “Stages” &gt; “Ajouter” ou “Modifier”.</text:p>
        </text:list-item>
      </text:list>
      <text:p text:style-name="P3">Postconditions (succès) :</text:p>
      <text:list text:style-name="L3">
        <text:list-item>
          <text:p text:style-name="P6">Le stage est correctement créé/modifié et visible dans Suivi &amp; Visites / Dashboard.</text:p>
        </text:list-item>
      </text:list>
      <text:p text:style-name="P3">Postconditions (échec) :</text:p>
      <text:list text:style-name="L4">
        <text:list-item>
          <text:p text:style-name="P7">Aucune modification; message d’erreur.</text:p>
        </text:list-item>
      </text:list>
      <text:h text:style-name="P2" text:outline-level="2"><text:bookmark text:name="4-donnes--rgles-de-gestion"/>4. Données &amp; règles de gestion</text:h>
      <text:p text:style-name="P3">Données manipulées :</text:p>
      <text:list text:style-name="L5">
        <text:list-item>
          <text:p text:style-name="P8">étudiant (référence)</text:p>
        </text:list-item>
        <text:list-item>
          <text:p text:style-name="P8">entreprise (référence)</text:p>
        </text:list-item>
        <text:list-item>
          <text:p text:style-name="P8">dateDébut, dateFin</text:p>
        </text:list-item>
        <text:list-item>
          <text:p text:style-name="P8">remarques</text:p>
        </text:list-item>
        <text:list-item>
          <text:p text:style-name="P8">statutAttestation</text:p>
        </text:list-item>
      </text:list>
      <text:p text:style-name="P3">Règles de gestion :</text:p>
      <text:list text:style-name="L6">
        <text:list-item>
          <text:p text:style-name="P9">R1 : dateFin ≥ dateDébut.</text:p>
        </text:list-item>
        <text:list-item>
          <text:p text:style-name="P9">R2 : étudiant et entreprise sont obligatoires.</text:p>
        </text:list-item>
        <text:list-item>
          <text:p text:style-name="P9">R3 : Le statut d’attestation est initialisé à “Non saisi”.</text:p>
        </text:list-item>
      </text:list>
      <text:h text:style-name="P2" text:outline-level="2"><text:bookmark text:name="5-scnarios"/>5. Scénarios</text:h>
      <text:p text:style-name="P3">Scénario nominal – Création d’un stage :</text:p>
      <text:list text:style-name="L7">
        <text:list-item>
          <text:p text:style-name="P10"><text:soft-page-break/>L’admin clique sur “Stages” &gt; “Ajouter”.</text:p>
        </text:list-item>
        <text:list-item>
          <text:p text:style-name="P10">Il choisit un étudiant et une entreprise.</text:p>
        </text:list-item>
        <text:list-item>
          <text:p text:style-name="P10">Il saisit les dates de début et fin + remarques.</text:p>
        </text:list-item>
        <text:list-item>
          <text:p text:style-name="P10">Il enregistre.</text:p>
        </text:list-item>
        <text:list-item>
          <text:p text:style-name="P10">Le système valide les dates et crée le stage.</text:p>
        </text:list-item>
      </text:list>
      <text:p text:style-name="P3">Scénarios alternatifs :</text:p>
      <text:list text:style-name="L8">
        <text:list-item>
          <text:p text:style-name="P11">A1 : L’admin modifie un stage existant pour corriger la période ou l’entreprise.</text:p>
        </text:list-item>
      </text:list>
      <text:p text:style-name="P3">Exceptions / erreurs :</text:p>
      <text:list text:style-name="L9">
        <text:list-item>
          <text:p text:style-name="P12">E1 : dateFin &lt; dateDébut → message “Dates incohérentes”.</text:p>
        </text:list-item>
        <text:list-item>
          <text:p text:style-name="P12">E2 : Aucune entreprise sélectionnée → champ obligatoire.</text:p>
        </text:list-item>
      </text:list>
      <text:h text:style-name="P2" text:outline-level="2"><text:bookmark text:name="7-maquettes-associes"/>7. Maquettes associées</text:h>
      <text:p text:style-name="P13"><draw:frame draw:style-name="fr1" draw:name="Image1" text:anchor-type="char" svg:x="0.201cm" svg:y="5.943cm" svg:width="8.248cm" svg:height="9.641cm" draw:z-index="0"><draw:image xlink:href="Pictures/10000001000004100000032BABF4E4E5.png" xlink:type="simple" xlink:show="embed" xlink:actuate="onLoad" draw:mime-type="image/png"/></draw:frame><draw:frame draw:style-name="fr2" draw:name="Image2" text:anchor-type="char" svg:width="17cm" svg:height="5.281cm" draw:z-index="1"><draw:image xlink:href="Pictures/10000001000007610000024B06459EEA.png" xlink:type="simple" xlink:show="embed" xlink:actuate="onLoad" draw:mime-type="image/png"/></draw:frame><draw:frame draw:style-name="fr1" draw:name="Image3" text:anchor-type="char" svg:x="8.202cm" svg:y="6.297cm" svg:width="9.751cm" svg:height="8.017cm" draw:z-index="2"><draw:image xlink:href="Pictures/10000001000003B100000309C2F515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1:00:39.635901100</meta:creation-date>
    <dc:date>2026-05-05T18:33:30.051201100</dc:date>
    <meta:editing-duration>PT26M17S</meta:editing-duration>
    <meta:editing-cycles>4</meta:editing-cycles>
    <meta:generator>LibreOffice/25.8.5.2$Windows_X86_64 LibreOffice_project/9c8b85f387cc00a89945a79c9e6239f32e450ac2</meta:generator>
    <meta:document-statistic meta:table-count="0" meta:image-count="3" meta:object-count="0" meta:page-count="2" meta:paragraph-count="39" meta:word-count="238" meta:character-count="1420" meta:non-whitespace-character-count="1240"/>
  </office:meta>
</office:document-meta>
</file>