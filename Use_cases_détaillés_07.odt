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3ED000001AC10FFD8C6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officeooo:rsid="001eed8d"/>
    </style:style>
    <style:style style:name="T2" style:family="text">
      <style:text-properties officeooo:rsid="001e2207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C-07– Mise à jour des statuts</text:p>
      <text:p text:style-name="Standard"/>
      <text:p text:style-name="P1">1. Identification</text:p>
      <text:p text:style-name="Standard">UC-ID : UC-07</text:p>
      <text:p text:style-name="Standard">Nom : Mettre à jour les statuts (attestation)</text:p>
      <text:p text:style-name="Standard">Version : 1.0</text:p>
      <text:p text:style-name="Standard">Date : <text:span text:style-name="T1">05</text:span>/<text:span text:style-name="T1">05</text:span>/2026</text:p>
      <text:p text:style-name="Standard">Auteur(s) : <text:span text:style-name="T2">Jordan K.</text:span></text:p>
      <text:p text:style-name="P1">2. Contexte</text:p>
      <text:p text:style-name="Standard">Acteur principal : Enseignant</text:p>
      <text:p text:style-name="Standard">Acteurs secondaires : Administrateur (coordination)</text:p>
      <text:p text:style-name="Standard">Objectif : Mettre à jour l’avancement des documents/jalons d’un stage et laisser une trace</text:p>
      <text:p text:style-name="Standard">consultable.</text:p>
      <text:p text:style-name="Standard">Périmètre : Écran ‘<text:span text:style-name="T2">S</text:span>tages’; + Fiche stage (onglet Statuts) + Journal d’historique</text:p>
      <text:p text:style-name="P1">3. Conditions</text:p>
      <text:p text:style-name="Standard">Préconditions : L’enseignant est affecté au stage (suivi ou visite) OU possède le rôle Admin ;</text:p>
      <text:p text:style-name="Standard">le stage existe.</text:p>
      <text:p text:style-name="Standard">Déclencheur : L’utilisateur clique sur ‘Mettre à jour les statuts’ depuis la fiche stage (ou</text:p>
      <text:p text:style-name="Standard">édition en ligne sur la liste).</text:p>
      <text:p text:style-name="Standard">Postconditions (succès) : Statuts enregistrés ; historique créé ; statuts visibles dans la vue</text:p>
      <text:p text:style-name="Standard">Postconditions (échec) : Aucune donnée modifiée ; message d’erreur affiché.</text:p>
      <text:p text:style-name="P1">4. Données &amp; règles de gestion</text:p>
      <text:p text:style-name="Standard">Données manipulées (champs) :</text:p>
      <text:p text:style-name="Standard">- remerciement (statut)</text:p>
      <text:p text:style-name="Standard">- bilan/suivi (statut)</text:p>
      <text:p text:style-name="Standard">- jury (statut)</text:p>
      <text:p text:style-name="Standard">- attestation (statut)</text:p>
      <text:p text:style-name="Standard">- commentaire (texte libre, option)</text:p>
      <text:p text:style-name="Standard">- date de mise à jour (automatique)</text:p>
      <text:p text:style-name="Standard">- auteur de la mise à jour (automatique)</text:p>
      <text:p text:style-name="Standard"/>
      <text:p text:style-name="P1">5. Scénarios</text:p>
      <text:p text:style-name="P1"/>
      <text:p text:style-name="Standard">Scénario nominal :</text:p>
      <text:p text:style-name="Standard">1. L’enseignant se connecte.</text:p>
      <text:p text:style-name="Standard">2. Il ouvre la liste ‘<text:span text:style-name="T2">Stage’</text:span>; (ou ‘Suivi &amp;Visite’).</text:p>
      <text:p text:style-name="Standard">3. Il sélectionne un stage et ouvre la fiche.</text:p>
      <text:p text:style-name="Standard">4. Il clique sur l’onglet ‘Statuts’.</text:p>
      <text:p text:style-name="Standard">5. Il modifie un ou plusieurs statuts (ex. Attestation = Reçue) et éventuellement un</text:p>
      <text:p text:style-name="Standard">commentaire.</text:p>
      <text:p text:style-name="Standard">6. Il enregistre.</text:p>
      <text:p text:style-name="Standard">7. Le système valide les données, enregistre les statuts, ajoute une entrée d’historique et</text:p>
      <text:p text:style-name="Standard">affiche un message de succès.</text:p>
      <text:p text:style-name="Standard">Exceptions / erreurs :</text:p>
      <text:p text:style-name="Standard">- 1.E1 : Droits insuffisants (enseignant non affecté) : accès refusé (403) + message.</text:p>
      <text:p text:style-name="Standard">- 4.E2 : Valeur de statut invalide : formulaire refusé + message d’erreur.</text:p>
      <text:p text:style-name="Standard">- 6.E3 : Problème technique (BDD indisponible) : message générique + aucune modification.</text:p>
      <text:p text:style-name="P1">7. Maquettes associées</text:p>
      <text:p text:style-name="P1"><draw:frame draw:style-name="fr1" draw:name="Image1" text:anchor-type="char" svg:width="17cm" svg:height="7.237cm" draw:z-index="0"><draw:image xlink:href="Pictures/10000001000003ED000001AC10FFD8C6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05T18:08:09.538774500</meta:creation-date>
    <meta:editing-duration>PT9M52S</meta:editing-duration>
    <meta:editing-cycles>2</meta:editing-cycles>
    <meta:generator>LibreOffice/25.8.5.2$Windows_X86_64 LibreOffice_project/9c8b85f387cc00a89945a79c9e6239f32e450ac2</meta:generator>
    <dc:date>2026-05-05T18:28:00.677774100</dc:date>
    <meta:document-statistic meta:table-count="0" meta:image-count="1" meta:object-count="0" meta:page-count="2" meta:paragraph-count="45" meta:word-count="292" meta:character-count="1811" meta:non-whitespace-character-count="1564"/>
  </office:meta>
</office:document-meta>
</file>