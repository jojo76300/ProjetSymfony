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5000002AA7F04F968.png" manifest:media-type="image/png"/>
  <manifest:file-entry manifest:full-path="Pictures/10000001000003E3000002CAFA1BC798.png" manifest:media-type="image/png"/>
  <manifest:file-entry manifest:full-path="Pictures/100000010000061B0000021D073D9A0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6--affecter-un-professeur-de-suivi-et-de-visite"/>UC‑06 – Affecter un professeur de suivi et de visite</text:h>
      <text:h text:style-name="P2" text:outline-level="2"><text:bookmark text:name="1-identification"/>1. Identification</text:h>
      <text:p text:style-name="P3">UC‑ID : UC‑06<text:line-break/>Nom : Affecter un professeur de suivi et un professeur de visite<text:line-break/>Version : 1.0<text:line-break/>Date : 05/05/2026<text:line-break/>Auteur(s) : Jordan K.</text:p>
      <text:h text:style-name="P2" text:outline-level="2"><text:bookmark text:name="2-contexte"/>2. Contexte</text:h>
      <text:p text:style-name="P3">Acteur principal : Administrateur<text:line-break/>Objectif : Répartir les stages entre les différents professeurs pour le suivi et la visite.<text:line-break/>Périmètre : Fiche stage / écran d’affectation.</text:p>
      <text:h text:style-name="P2" text:outline-level="2"><text:bookmark text:name="3-conditions"/>3. Conditions</text:h>
      <text:p text:style-name="P3">Préconditions :</text:p>
      <text:list text:style-name="L1">
        <text:list-item>
          <text:p text:style-name="P4">Le stage existe.</text:p>
        </text:list-item>
        <text:list-item>
          <text:p text:style-name="P5"><text:span text:style-name="T1">Les professeurs sont créés en tant que </text:span><text:span text:style-name="Source_20_Text"><text:span text:style-name="T2">Utilisateur</text:span></text:span><text:span text:style-name="T1"> avec rôle enseignant.</text:span></text:p>
        </text:list-item>
      </text:list>
      <text:p text:style-name="P3">Déclencheur :</text:p>
      <text:list text:style-name="L2">
        <text:list-item>
          <text:p text:style-name="P6">L’Admin ouvre un stage et renseigne les champs “Professeur de suivi” et “Professeur de visite”.</text:p>
        </text:list-item>
      </text:list>
      <text:p text:style-name="P3">Postconditions (succès) :</text:p>
      <text:list text:style-name="L3">
        <text:list-item>
          <text:p text:style-name="P7">Les affectations sont enregistrées.</text:p>
        </text:list-item>
        <text:list-item>
          <text:p text:style-name="P7">Elles sont visibles dans la vue Suivi &amp; Visites et dans le Dashboard.</text:p>
        </text:list-item>
        <text:list-item>
          <text:p text:style-name="P7">Une entrée d’historique est créée.</text:p>
        </text:list-item>
      </text:list>
      <text:p text:style-name="P3">Postconditions (échec) :</text:p>
      <text:list text:style-name="L4">
        <text:list-item>
          <text:p text:style-name="P8">Aucune modification; message d’erreur.</text:p>
        </text:list-item>
      </text:list>
      <text:h text:style-name="P2" text:outline-level="2"><text:bookmark text:name="4-donnes--rgles-de-gestion"/>4. Données &amp; règles de gestion</text:h>
      <text:p text:style-name="P3">Données manipulées :</text:p>
      <text:list text:style-name="L5">
        <text:list-item>
          <text:p text:style-name="P9">stage</text:p>
        </text:list-item>
        <text:list-item>
          <text:p text:style-name="P9">profSuivi (Utilisateur)</text:p>
        </text:list-item>
        <text:list-item>
          <text:p text:style-name="P9">profVisite (Utilisateur)</text:p>
        </text:list-item>
      </text:list>
      <text:p text:style-name="P3">Règles de gestion :</text:p>
      <text:list text:style-name="L6">
        <text:list-item>
          <text:p text:style-name="P10"><text:span text:style-name="T1">R1 : profSuivi et profVisite doivent être des utilisateurs avec rôle </text:span><text:span text:style-name="Source_20_Text"><text:span text:style-name="T2">ROLE_TEACHER</text:span></text:span><text:span text:style-name="T1">.</text:span></text:p>
        </text:list-item>
        <text:list-item>
          <text:p text:style-name="P10"><text:span text:style-name="T1">R2 : Les changements sont tracés dans l’entité </text:span><text:span text:style-name="Source_20_Text"><text:span text:style-name="T2">Historique</text:span></text:span><text:span text:style-name="T1">.</text:span></text:p>
        </text:list-item>
      </text:list>
      <text:h text:style-name="P2" text:outline-level="2"><text:bookmark text:name="5-scnarios"/>5. Scénarios</text:h>
      <text:p text:style-name="P3">Scénario nominal :</text:p>
      <text:list text:style-name="L7">
        <text:list-item>
          <text:p text:style-name="P11"><text:soft-page-break/>L’Admin ouvre la fiche d’un stage.</text:p>
        </text:list-item>
        <text:list-item>
          <text:p text:style-name="P11">Il choisit un professeur de suivi et un professeur de visite dans les listes déroulantes.</text:p>
        </text:list-item>
        <text:list-item>
          <text:p text:style-name="P11">Il enregistre.</text:p>
        </text:list-item>
        <text:list-item>
          <text:p text:style-name="P11">Le système met à jour le stage, crée une entrée d’historique et affiche un message de succès.</text:p>
        </text:list-item>
      </text:list>
      <text:p text:style-name="P3">Exceptions / erreurs :</text:p>
      <text:list text:style-name="L8">
        <text:list-item>
          <text:p text:style-name="P12">E1 : Utilisateur sélectionné sans rôle enseignant (si bug de données) → message d’erreur, pas de sauvegarde.</text:p>
        </text:list-item>
      </text:list>
      <text:h text:style-name="P2" text:outline-level="2"><text:bookmark text:name="7-maquettes-associes"/>7. Maquettes associées</text:h>
      <text:p text:style-name="P13"><draw:frame draw:style-name="fr1" draw:name="Image1" text:anchor-type="char" svg:x="0.531cm" svg:y="0cm" svg:width="11.758cm" svg:height="7.793cm" draw:z-index="0"><draw:image xlink:href="Pictures/1000000100000405000002AA7F04F968.png" xlink:type="simple" xlink:show="embed" xlink:actuate="onLoad" draw:mime-type="image/png"/></draw:frame><draw:frame draw:style-name="fr1" draw:name="Image2" text:anchor-type="char" svg:x="0.238cm" svg:y="7.368cm" svg:width="12.979cm" svg:height="8.283cm" draw:z-index="1"><draw:image xlink:href="Pictures/10000001000003E3000002CAFA1BC798.png" xlink:type="simple" xlink:show="embed" xlink:actuate="onLoad" draw:mime-type="image/png"/></draw:frame><draw:frame draw:style-name="fr1" draw:name="Image3" text:anchor-type="char" svg:x="-0.238cm" svg:y="15.796cm" svg:width="15.831cm" svg:height="5.479cm" draw:z-index="2"><draw:image xlink:href="Pictures/100000010000061B0000021D073D9A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1:02:41.218849300</meta:creation-date>
    <dc:date>2026-05-05T18:31:50.797008500</dc:date>
    <meta:editing-duration>PT24M10S</meta:editing-duration>
    <meta:editing-cycles>3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34" meta:word-count="256" meta:character-count="1527" meta:non-whitespace-character-count="1321"/>
  </office:meta>
</office:document-meta>
</file>