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E0000029730A83531.png" manifest:media-type="image/png"/>
  <manifest:file-entry manifest:full-path="Pictures/100000010000062B000002896836C87A.png" manifest:media-type="image/png"/>
  <manifest:file-entry manifest:full-path="Pictures/1000000100000260000002A42223E6D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00%" fo:text-indent="0cm" style:auto-text-indent="false" fo:padding="0cm" fo:border="non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line-height="100%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0" style:family="paragraph" style:parent-style-name="Text_20_body" style:list-style-name="L7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1" style:family="paragraph" style:parent-style-name="Text_20_body" style:list-style-name="L8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2" style:family="paragraph" style:parent-style-name="Text_20_body" style:list-style-name="L9">
      <style:paragraph-properties fo:margin-left="0cm" fo:margin-right="0cm" fo:line-height="100%" fo:text-indent="0cm" style:auto-text-indent="false" fo:padding="0cm" fo:border="none"/>
    </style:style>
    <style:style style:name="P13" style:family="paragraph" style:parent-style-name="Text_20_body" style:list-style-name="L10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4" style:family="paragraph" style:parent-style-name="Heading_20_2">
      <style:paragraph-properties fo:line-height="100%"/>
      <style:text-properties fo:font-size="12pt" officeooo:rsid="0009fcb9" officeooo:paragraph-rsid="0009fcb9" style:font-size-asian="12pt" style:font-size-complex="12pt"/>
    </style:style>
    <style:style style:name="P15" style:family="paragraph" style:parent-style-name="Text_20_body">
      <style:paragraph-properties fo:line-height="100%"/>
      <style:text-properties fo:font-size="12pt" officeooo:rsid="0009fcb9" officeooo:paragraph-rsid="0009fcb9" style:font-size-asian="12pt" style:font-size-complex="12pt"/>
    </style:style>
    <style:style style:name="T1" style:family="text">
      <style:text-properties fo:font-size="12pt" style:font-size-asian="12pt" style:font-size-complex="12pt" loext:padding="0cm" loext:border="none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uc02--grer-les-tudiants-crud--archivage"/>UC‑02 – Gérer les étudiants (CRUD + archivage)</text:h>
      <text:h text:style-name="P2" text:outline-level="2"><text:bookmark text:name="1-identification"/>1. Identification</text:h>
      <text:p text:style-name="P3"><text:span text:style-name="Strong_20_Emphasis"><text:span text:style-name="T1">UC‑ID :</text:span></text:span><text:span text:style-name="T2"> UC‑02<text:line-break/></text:span><text:span text:style-name="Strong_20_Emphasis"><text:span text:style-name="T1">Nom :</text:span></text:span><text:span text:style-name="T2"> Gérer les étudiants<text:line-break/></text:span><text:span text:style-name="Strong_20_Emphasis"><text:span text:style-name="T1">Version :</text:span></text:span><text:span text:style-name="T2"> 1.0<text:line-break/></text:span><text:span text:style-name="Strong_20_Emphasis"><text:span text:style-name="T1">Date :</text:span></text:span><text:span text:style-name="T2"> 05/05/2026<text:line-break/></text:span><text:span text:style-name="Strong_20_Emphasis"><text:span text:style-name="T1">Auteur(s) :</text:span></text:span><text:span text:style-name="T2"> Jordan K.</text:span></text:p>
      <text:h text:style-name="P2" text:outline-level="2"><text:bookmark text:name="2-contexte"/>2. Contexte</text:h>
      <text:p text:style-name="P3"><text:span text:style-name="Strong_20_Emphasis"><text:span text:style-name="T1">Acteur principal :</text:span></text:span><text:span text:style-name="T2"> Administrateur<text:line-break/></text:span><text:span text:style-name="Strong_20_Emphasis"><text:span text:style-name="T1">Acteurs secondaires :</text:span></text:span><text:span text:style-name="T2"> Enseignant (consultation éventuelle)<text:line-break/></text:span><text:span text:style-name="Strong_20_Emphasis"><text:span text:style-name="T1">Objectif :</text:span></text:span><text:span text:style-name="T2"> Permettre à l’administrateur de créer, modifier, archiver et consulter les étudiants afin de suivre leurs stages.<text:line-break/></text:span><text:span text:style-name="Strong_20_Emphasis"><text:span text:style-name="T1">Périmètre :</text:span></text:span><text:span text:style-name="T2"> Menu “Étudiants” (liste + formulaires d’ajout/édition + archive).</text:span></text:p>
      <text:h text:style-name="P2" text:outline-level="2"><text:bookmark text:name="3-conditions"/>3. Conditions</text:h>
      <text:p text:style-name="P3"><text:span text:style-name="Strong_20_Emphasis"><text:span text:style-name="T1">Préconditions :</text:span></text:span></text:p>
      <text:list text:style-name="L1">
        <text:list-item>
          <text:p text:style-name="P4">L’utilisateur est connecté avec le rôle Administrateur.</text:p>
        </text:list-item>
      </text:list>
      <text:p text:style-name="P3"><text:span text:style-name="Strong_20_Emphasis"><text:span text:style-name="T1">Déclencheur :</text:span></text:span></text:p>
      <text:list text:style-name="L2">
        <text:list-item>
          <text:p text:style-name="P5">L’administrateur clique sur le menu “Étudiants”, puis sur “Ajouter”, “Modifier” ou “Archiver”.</text:p>
        </text:list-item>
      </text:list>
      <text:p text:style-name="P3"><text:span text:style-name="Strong_20_Emphasis"><text:span text:style-name="T1">Postconditions (succès) :</text:span></text:span></text:p>
      <text:list text:style-name="L3">
        <text:list-item>
          <text:p text:style-name="P6">L’étudiant est créé/modifié/archivé en base et visible dans les listes appropriées.</text:p>
        </text:list-item>
      </text:list>
      <text:p text:style-name="P3"><text:span text:style-name="Strong_20_Emphasis"><text:span text:style-name="T1">Postconditions (échec) :</text:span></text:span></text:p>
      <text:list text:style-name="L4">
        <text:list-item>
          <text:p text:style-name="P7">Les données ne sont pas sauvegardées et un message d’erreur est affiché.</text:p>
        </text:list-item>
      </text:list>
      <text:h text:style-name="P2" text:outline-level="2"><text:bookmark text:name="4-donnes--rgles-de-gestion"/>4. Données &amp; règles de gestion</text:h>
      <text:p text:style-name="P3"><text:span text:style-name="Strong_20_Emphasis"><text:span text:style-name="T1">Données manipulées :</text:span></text:span></text:p>
      <text:list text:style-name="L5">
        <text:list-item>
          <text:p text:style-name="P8">nom</text:p>
        </text:list-item>
        <text:list-item>
          <text:p text:style-name="P8">prénom</text:p>
        </text:list-item>
        <text:list-item>
          <text:p text:style-name="P8">filière (SLAM / SISR)</text:p>
        </text:list-item>
        <text:list-item>
          <text:p text:style-name="P8">promotion (classe + session)</text:p>
        </text:list-item>
        <text:list-item>
          <text:p text:style-name="P8">isArchived (booléen)</text:p>
        </text:list-item>
      </text:list>
      <text:p text:style-name="P3"><text:span text:style-name="Strong_20_Emphasis"><text:span text:style-name="T1">Règles de gestion :</text:span></text:span></text:p>
      <text:list text:style-name="L6">
        <text:list-item>
          <text:p text:style-name="P9">R1 : Nom, prénom, filière et promotion sont obligatoires.</text:p>
        </text:list-item>
        <text:list-item>
          <text:p text:style-name="P9">R2 : Filière ∈ {SLAM, SISR}.</text:p>
        </text:list-item>
        <text:list-item>
          <text:p text:style-name="P9">R3 : Un étudiant archivé n’apparaît plus dans les listes opérationnelles (création de nouveaux stages) mais reste dans l’historique.</text:p>
        </text:list-item>
      </text:list>
      <text:h text:style-name="P2" text:outline-level="2"><text:bookmark text:name="5-scnarios"/>5. Scénarios</text:h>
      <text:p text:style-name="P3"><text:span text:style-name="Strong_20_Emphasis"><text:span text:style-name="T1">Scénario nominal – Ajout d’un étudiant :</text:span></text:span></text:p>
      <text:list text:style-name="L7">
        <text:list-item>
          <text:p text:style-name="P10">L’administrateur clique sur “Étudiants” puis sur “Ajouter”.</text:p>
        </text:list-item>
        <text:list-item>
          <text:p text:style-name="P10"><text:soft-page-break/>Le système affiche le formulaire d’ajout (modal stylée).</text:p>
        </text:list-item>
        <text:list-item>
          <text:p text:style-name="P10">L’admin saisit nom, prénom, filière, promotion.</text:p>
        </text:list-item>
        <text:list-item>
          <text:p text:style-name="P10">L’admin valide le formulaire.</text:p>
        </text:list-item>
        <text:list-item>
          <text:p text:style-name="P10">Le système valide les données, crée l’étudiant et affiche un message de succès.</text:p>
        </text:list-item>
        <text:list-item>
          <text:p text:style-name="P10">La liste des étudiants est mise à jour.</text:p>
        </text:list-item>
      </text:list>
      <text:p text:style-name="P3"><text:span text:style-name="Strong_20_Emphasis"><text:span text:style-name="T1">Scénario nominal – Modification :</text:span></text:span></text:p>
      <text:list text:style-name="L8">
        <text:list-item>
          <text:p text:style-name="P11">L’administrateur ouvre la liste des étudiants.</text:p>
        </text:list-item>
        <text:list-item>
          <text:p text:style-name="P11">Il clique sur “Modifier” pour un étudiant donné.</text:p>
        </text:list-item>
        <text:list-item>
          <text:p text:style-name="P11">Le système affiche le formulaire pré‑rempli.</text:p>
        </text:list-item>
        <text:list-item>
          <text:p text:style-name="P11">L’admin modifie les informations et enregistre.</text:p>
        </text:list-item>
        <text:list-item>
          <text:p text:style-name="P11">Le système met à jour l’étudiant et affiche un message de succès.</text:p>
        </text:list-item>
      </text:list>
      <text:p text:style-name="P3"><text:span text:style-name="Strong_20_Emphasis"><text:span text:style-name="T1">Scénarios alternatifs :</text:span></text:span></text:p>
      <text:list text:style-name="L9">
        <text:list-item>
          <text:p text:style-name="P12"><text:span text:style-name="T2">A1 : L’admin clique sur “Archiver” → l’étudiant passe en </text:span><text:span text:style-name="Source_20_Text"><text:span text:style-name="T1">isArchived = true</text:span></text:span><text:span text:style-name="T2">, il disparaît de la liste principale mais reste présent en base.</text:span></text:p>
        </text:list-item>
      </text:list>
      <text:p text:style-name="P3"><text:span text:style-name="Strong_20_Emphasis"><text:span text:style-name="T1">Exceptions / erreurs :</text:span></text:span></text:p>
      <text:list text:style-name="L10">
        <text:list-item>
          <text:p text:style-name="P13">E1 : Un champ obligatoire est vide → message d’erreur sur le formulaire, aucun enregistrement.</text:p>
        </text:list-item>
        <text:list-item>
          <text:p text:style-name="P13">E2 : Erreur technique (BDD indisponible) → message générique, aucune modification.</text:p>
        </text:list-item>
      </text:list>
      <text:h text:style-name="P14" text:outline-level="2"><text:bookmark text:name="7-maquettes-associes"/>7. Maquettes associées</text:h>
      <text:p text:style-name="P15"><draw:frame draw:style-name="fr1" draw:name="Image1" text:anchor-type="char" svg:x="0.155cm" svg:y="-0.152cm" svg:width="17cm" svg:height="5.823cm" draw:z-index="2"><draw:image xlink:href="Pictures/100000010000062B000002896836C87A.png" xlink:type="simple" xlink:show="embed" xlink:actuate="onLoad" draw:mime-type="image/png"/></draw:frame><draw:frame draw:style-name="fr1" draw:name="Image2" text:anchor-type="char" svg:x="-0.215cm" svg:y="5.369cm" svg:width="7.673cm" svg:height="8.53cm" draw:z-index="0"><draw:image xlink:href="Pictures/1000000100000260000002A42223E6DE.png" xlink:type="simple" xlink:show="embed" xlink:actuate="onLoad" draw:mime-type="image/png"/></draw:frame><draw:frame draw:style-name="fr1" draw:name="Image3" text:anchor-type="char" svg:x="8.214cm" svg:y="5.352cm" svg:width="8.615cm" svg:height="8.548cm" draw:z-index="1"><draw:image xlink:href="Pictures/100000010000026E0000029730A835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0:50:32.010370400</meta:creation-date>
    <dc:date>2026-05-05T18:35:25.881058500</dc:date>
    <meta:editing-duration>PT34M4S</meta:editing-duration>
    <meta:editing-cycles>3</meta:editing-cycles>
    <meta:generator>LibreOffice/25.8.5.2$Windows_X86_64 LibreOffice_project/9c8b85f387cc00a89945a79c9e6239f32e450ac2</meta:generator>
    <meta:document-statistic meta:table-count="0" meta:image-count="3" meta:object-count="0" meta:page-count="2" meta:paragraph-count="45" meta:word-count="362" meta:character-count="2283" meta:non-whitespace-character-count="1989"/>
  </office:meta>
</office:document-meta>
</file>