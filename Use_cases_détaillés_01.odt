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900000019237B8CA2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line-height="100%" fo:text-indent="0cm" style:auto-text-indent="false" fo:padding="0cm" fo:border="none"/>
    </style:style>
    <style:style style:name="P2" style:family="paragraph" style:parent-style-name="Heading_20_2">
      <style:paragraph-properties fo:line-height="100%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Text_20_body" style:list-style-name="L1">
      <style:paragraph-properties fo:margin-left="0cm" fo:margin-right="0cm" fo:line-height="100%" fo:text-indent="0cm" style:auto-text-indent="false" fo:padding="0cm" fo:border="none"/>
    </style:style>
    <style:style style:name="P4" style:family="paragraph" style:parent-style-name="Text_20_body" style:list-style-name="L2">
      <style:paragraph-properties fo:margin-left="0cm" fo:margin-right="0cm" fo:line-height="100%" fo:text-indent="0cm" style:auto-text-indent="false" fo:padding="0cm" fo:border="none"/>
    </style:style>
    <style:style style:name="P5" style:family="paragraph" style:parent-style-name="Text_20_body" style:list-style-name="L3">
      <style:paragraph-properties fo:margin-left="0cm" fo:margin-right="0cm" fo:line-height="100%" fo:text-indent="0cm" style:auto-text-indent="false" fo:padding="0cm" fo:border="none"/>
    </style:style>
    <style:style style:name="P6" style:family="paragraph" style:parent-style-name="Text_20_body" style:list-style-name="L4">
      <style:paragraph-properties fo:margin-left="0cm" fo:margin-right="0cm" fo:line-height="100%" fo:text-indent="0cm" style:auto-text-indent="false" fo:padding="0cm" fo:border="none"/>
    </style:style>
    <style:style style:name="P7" style:family="paragraph" style:parent-style-name="Text_20_body" style:list-style-name="L5">
      <style:paragraph-properties fo:margin-left="0cm" fo:margin-right="0cm" fo:line-height="100%" fo:text-indent="0cm" style:auto-text-indent="false" fo:padding="0cm" fo:border="none"/>
    </style:style>
    <style:style style:name="P8" style:family="paragraph" style:parent-style-name="Text_20_body" style:list-style-name="L6">
      <style:paragraph-properties fo:margin-left="0cm" fo:margin-right="0cm" fo:line-height="100%" fo:text-indent="0cm" style:auto-text-indent="false" fo:padding="0cm" fo:border="none"/>
    </style:style>
    <style:style style:name="P9" style:family="paragraph" style:parent-style-name="Text_20_body" style:list-style-name="L7">
      <style:paragraph-properties fo:margin-left="0cm" fo:margin-right="0cm" fo:line-height="100%" fo:text-indent="0cm" style:auto-text-indent="false" fo:padding="0cm" fo:border="none"/>
    </style:style>
    <style:style style:name="P10" style:family="paragraph" style:parent-style-name="Text_20_body">
      <style:paragraph-properties fo:line-height="100%"/>
    </style:style>
    <style:style style:name="T1" style:family="text">
      <style:text-properties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h text:style-name="P2" text:outline-level="2"><text:bookmark text:name="uc-01--se-connecter"/>UC-01 — Se connecter</text:h>
      <text:p text:style-name="P1"><text:span text:style-name="Strong_20_Emphasis"><text:span text:style-name="T1">1. Identification</text:span></text:span><text:line-break/>UC-ID : UC-01<text:line-break/>Nom : Se connecter<text:line-break/>Version : 1.0 – 05/05/2026<text:line-break/>Auteur : Jordan K.</text:p>
      <text:p text:style-name="P1"><text:span text:style-name="Strong_20_Emphasis"><text:span text:style-name="T1">2. Contexte</text:span></text:span><text:line-break/>Acteur principal : Utilisateur (Admin ou Enseignant)<text:line-break/>Acteurs secondaires : Aucun<text:line-break/>Objectif : Permettre à l’utilisateur de s’authentifier et d’accéder aux fonctionnalités adaptées à son rôle.<text:line-break/>Périmètre : Page /login + redirection vers <text:span text:style-name="Source_20_Text"><text:span text:style-name="T1">/</text:span></text:span> (Accueil).</text:p>
      <text:p text:style-name="P1"><text:span text:style-name="Strong_20_Emphasis"><text:span text:style-name="T1">3. Conditions</text:span></text:span><text:line-break/>Préconditions :</text:p>
      <text:list text:style-name="L1">
        <text:list-item>
          <text:p text:style-name="P3">Le compte utilisateur existe en base et est actif.<text:line-break/>Déclencheur :</text:p>
        </text:list-item>
        <text:list-item>
          <text:p text:style-name="P3">L’utilisateur saisit ses identifiants et soumet le formulaire de login.<text:line-break/>Postconditions (succès) :</text:p>
        </text:list-item>
        <text:list-item>
          <text:p text:style-name="P3">Session ouverte, redirection vers la page d’accueil, rôle chargé.<text:line-break/>Postconditions (échec) :</text:p>
        </text:list-item>
        <text:list-item>
          <text:p text:style-name="P3">Message d’erreur, aucune session ouverte.</text:p>
        </text:list-item>
      </text:list>
      <text:p text:style-name="P1"><text:span text:style-name="Strong_20_Emphasis"><text:span text:style-name="T1">4. Données &amp; règles de gestion</text:span></text:span><text:line-break/>Données manipulées :</text:p>
      <text:list text:style-name="L2">
        <text:list-item>
          <text:p text:style-name="P4">email</text:p>
        </text:list-item>
        <text:list-item>
          <text:p text:style-name="P4">mot de passe</text:p>
        </text:list-item>
        <text:list-item>
          <text:p text:style-name="P4">rôle(s) (ROLE_ADMIN, ROLE_TEACHER)</text:p>
        </text:list-item>
      </text:list>
      <text:p text:style-name="P1">Règles de gestion :</text:p>
      <text:list text:style-name="L3">
        <text:list-item>
          <text:p text:style-name="P5">R1 : L’email doit être unique.</text:p>
        </text:list-item>
        <text:list-item>
          <text:p text:style-name="P5">R2 : Mot de passe chiffré, vérifié par le PasswordHasher de Symfony.</text:p>
        </text:list-item>
        <text:list-item>
          <text:p text:style-name="P5">R3 : Redirection vers <text:span text:style-name="Source_20_Text"><text:span text:style-name="T1">app_home</text:span></text:span> en cas de succès.</text:p>
        </text:list-item>
      </text:list>
      <text:p text:style-name="P1"><text:span text:style-name="Strong_20_Emphasis"><text:span text:style-name="T1">5. Scénarios</text:span></text:span><text:line-break/>Scénario nominal :</text:p>
      <text:list text:style-name="L4">
        <text:list-item>
          <text:p text:style-name="P6">L’utilisateur accède à <text:span text:style-name="Source_20_Text"><text:span text:style-name="T1">/login</text:span></text:span>.</text:p>
        </text:list-item>
        <text:list-item>
          <text:p text:style-name="P6">Il saisit son email et son mot de passe.</text:p>
        </text:list-item>
        <text:list-item>
          <text:p text:style-name="P6">Il valide le formulaire.</text:p>
        </text:list-item>
        <text:list-item>
          <text:p text:style-name="P6">Le système vérifie les identifiants.</text:p>
        </text:list-item>
        <text:list-item>
          <text:p text:style-name="P6">Le système ouvre la session et redirige vers l’accueil.</text:p>
        </text:list-item>
      </text:list>
      <text:p text:style-name="P1">Scénarios alternatifs :</text:p>
      <text:list text:style-name="L5">
        <text:list-item>
          <text:p text:style-name="P7"><text:soft-page-break/>A1 : L’utilisateur était déjà sur une page protégée → redirection vers la page initialement demandée après login (TargetPathTrait).</text:p>
        </text:list-item>
      </text:list>
      <text:p text:style-name="P1">Exceptions / erreurs :</text:p>
      <text:list text:style-name="L6">
        <text:list-item>
          <text:p text:style-name="P8">E1 : Identifiants invalides → message d’erreur “Email ou mot de passe incorrect”.</text:p>
        </text:list-item>
        <text:list-item>
          <text:p text:style-name="P8">E2 : Compte désactivé → message dédié si tu ajoutes ce cas.</text:p>
        </text:list-item>
      </text:list>
      <text:p text:style-name="P1"><text:span text:style-name="Strong_20_Emphasis"><text:span text:style-name="T1">6. Critères d’acceptation</text:span></text:span></text:p>
      <text:list text:style-name="L7">
        <text:list-item>
          <text:p text:style-name="P9">CA1 : Un utilisateur avec des identifiants valides est connecté et redirigé.</text:p>
        </text:list-item>
        <text:list-item>
          <text:p text:style-name="P9">CA2 : Avec un mauvais mot de passe, aucun accès n’est donné.</text:p>
        </text:list-item>
      </text:list>
      <text:p text:style-name="P1"><text:span text:style-name="Strong_20_Emphasis"><text:span text:style-name="T1">7. Maquettes associées</text:span></text:span><text:line-break/></text:p>
      <text:p text:style-name="P10"><draw:frame draw:style-name="fr1" draw:name="Image1" text:anchor-type="as-char" svg:width="16.087cm" svg:height="7.091cm" draw:z-index="0"><draw:image xlink:href="Pictures/10000001000003900000019237B8CA2C.png" xlink:type="simple" xlink:show="embed" xlink:actuate="onLoad" draw:mime-type="image/png"/></draw:frame><text:s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5T09:34:38.524378100</meta:creation-date>
    <dc:date>2026-05-05T18:35:54.668528200</dc:date>
    <meta:editing-duration>PT1H42M33S</meta:editing-duration>
    <meta:editing-cycles>3</meta:editing-cycles>
    <meta:generator>LibreOffice/25.8.5.2$Windows_X86_64 LibreOffice_project/9c8b85f387cc00a89945a79c9e6239f32e450ac2</meta:generator>
    <meta:document-statistic meta:table-count="0" meta:image-count="1" meta:object-count="0" meta:page-count="2" meta:paragraph-count="32" meta:word-count="286" meta:character-count="1704" meta:non-whitespace-character-count="1464"/>
  </office:meta>
</office:document-meta>
</file>