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2000001C65927EABA.png" manifest:media-type="image/png"/>
  <manifest:file-entry manifest:full-path="Pictures/10000001000003DE00000117E90F13AC.png" manifest:media-type="image/png"/>
  <manifest:file-entry manifest:full-path="Pictures/10000001000001F800000236B09A7259.png" manifest:media-type="image/png"/>
  <manifest:file-entry manifest:full-path="Pictures/10000001000003DC000001509C8A3A0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2" style:family="paragraph" style:parent-style-name="Heading_20_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4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0" style:family="paragraph" style:parent-style-name="Text_20_body" style:list-style-name="L7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1" style:family="paragraph" style:parent-style-name="Text_20_body" style:list-style-name="L8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2" style:family="paragraph" style:parent-style-name="Text_20_body" style:list-style-name="L9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/>
      <style:text-properties fo:font-size="12pt" officeooo:paragraph-rsid="000e33bf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uc08--consulter-la-vue-suivi--visites"/>UC‑08 – Consulter la vue “Suivi &amp; Visites”</text:h>
      <text:h text:style-name="P2" text:outline-level="2"><text:bookmark text:name="1-identification"/>1. Identification</text:h>
      <text:p text:style-name="P3">UC‑ID : UC‑08<text:line-break/>Nom : Consulter la vue “Suivi &amp; Visites”<text:line-break/>Version : 1.0<text:line-break/>Date : 05/05/2026<text:line-break/>Auteur(s) : Jordan K.</text:p>
      <text:h text:style-name="P2" text:outline-level="2"><text:bookmark text:name="2-contexte"/>2. Contexte</text:h>
      <text:p text:style-name="P3">Acteur principal : Administrateur / Enseignant<text:line-break/>Objectif : Piloter l’avancement des stages via une vue consolidée (suivi + visites) filtrable.<text:line-break/>Périmètre : Menu “Suivi &amp; visites”.</text:p>
      <text:h text:style-name="P2" text:outline-level="2"><text:bookmark text:name="3-conditions"/>3. Conditions</text:h>
      <text:p text:style-name="P3">Préconditions :</text:p>
      <text:list text:style-name="L1">
        <text:list-item>
          <text:p text:style-name="P4">Utilisateur connecté (Admin ou Enseignant).</text:p>
        </text:list-item>
        <text:list-item>
          <text:p text:style-name="P4">Des stages existent.</text:p>
        </text:list-item>
      </text:list>
      <text:p text:style-name="P3">Déclencheur :</text:p>
      <text:list text:style-name="L2">
        <text:list-item>
          <text:p text:style-name="P5">Clic sur le menu “Suivi &amp; visites”.</text:p>
        </text:list-item>
      </text:list>
      <text:p text:style-name="P3">Postconditions (succès) :</text:p>
      <text:list text:style-name="L3">
        <text:list-item>
          <text:p text:style-name="P6">La liste des stages est affichée, filtrée en fonction du rôle et des filtres saisis.</text:p>
        </text:list-item>
      </text:list>
      <text:p text:style-name="P3">Postconditions (échec) :</text:p>
      <text:list text:style-name="L4">
        <text:list-item>
          <text:p text:style-name="P7">Message d’erreur en cas de problème technique.</text:p>
        </text:list-item>
      </text:list>
      <text:h text:style-name="P2" text:outline-level="2"><text:bookmark text:name="4-donnes--rgles-de-gestion"/>4. Données &amp; règles de gestion</text:h>
      <text:p text:style-name="P3">Données manipulées :</text:p>
      <text:list text:style-name="L5">
        <text:list-item>
          <text:p text:style-name="P8">Liste des stages (étudiant, entreprise, dates, profs, statuts…)</text:p>
        </text:list-item>
        <text:list-item>
          <text:p text:style-name="P8">Filtres : promotion, filière, entreprise, professeur, statut, etc.</text:p>
        </text:list-item>
      </text:list>
      <text:p text:style-name="P3">Règles de gestion :</text:p>
      <text:list text:style-name="L6">
        <text:list-item>
          <text:p text:style-name="P9">R1 : L’Admin voit tous les stages.</text:p>
        </text:list-item>
        <text:list-item>
          <text:p text:style-name="P9">R2 : L’Enseignant voit uniquement les stages où il est prof de suivi ou de visite.</text:p>
        </text:list-item>
        <text:list-item>
          <text:p text:style-name="P9">R3 : Les boutons actions (Stage / Visite / Historique) sont accessibles selon les droits.</text:p>
        </text:list-item>
      </text:list>
      <text:h text:style-name="P2" text:outline-level="2"><text:bookmark text:name="5-scnarios"/>5. Scénarios</text:h>
      <text:p text:style-name="P3">Scénario nominal (Admin) :</text:p>
      <text:list text:style-name="L7">
        <text:list-item>
          <text:p text:style-name="P10">L’Admin clique sur “Suivi &amp; visites”.</text:p>
        </text:list-item>
        <text:list-item>
          <text:p text:style-name="P10">Le système charge la liste de tous les stages.</text:p>
        </text:list-item>
        <text:list-item>
          <text:p text:style-name="P10">L’Admin applique éventuellement des filtres (promotion, prof, entreprise…).</text:p>
        </text:list-item>
        <text:list-item>
          <text:p text:style-name="P10"><text:soft-page-break/>La liste est rafraîchie.</text:p>
        </text:list-item>
        <text:list-item>
          <text:p text:style-name="P10">L’Admin peut cliquer sur les actions (modifier stage, ouvrir visite, voir historique).</text:p>
        </text:list-item>
      </text:list>
      <text:p text:style-name="P3">Scénario nominal (Enseignant) :</text:p>
      <text:list text:style-name="L8">
        <text:list-item>
          <text:p text:style-name="P11">Le Professeur clique sur “Suivi &amp; visites”.</text:p>
        </text:list-item>
        <text:list-item>
          <text:p text:style-name="P11">Le système charge uniquement les stages qui lui sont affectés.</text:p>
        </text:list-item>
        <text:list-item>
          <text:p text:style-name="P11">Il peut filtrer et accéder aux actions de son périmètre (statuts, visites, historique).</text:p>
        </text:list-item>
      </text:list>
      <text:p text:style-name="P3">Exceptions / erreurs :</text:p>
      <text:list text:style-name="L9">
        <text:list-item>
          <text:p text:style-name="P12">E1 : Aucun stage ne correspond aux filtres → message “Aucun résultat”.</text:p>
        </text:list-item>
      </text:list>
      <text:h text:style-name="P2" text:outline-level="2"><text:bookmark text:name="7-maquettes-associes"/>7. Maquettes associées</text:h>
      <text:p text:style-name="P13"><draw:frame draw:style-name="fr1" draw:name="Image1" text:anchor-type="as-char" svg:width="17.463cm" svg:height="4.921cm" draw:z-index="0"><draw:image xlink:href="Pictures/10000001000003DE00000117E90F13AC.png" xlink:type="simple" xlink:show="embed" xlink:actuate="onLoad" draw:mime-type="image/png"/></draw:frame></text:p>
      <text:p text:style-name="P13"><draw:frame draw:style-name="fr1" draw:name="Image2" text:anchor-type="as-char" svg:width="7.521cm" svg:height="6.865cm" draw:z-index="1"><draw:image xlink:href="Pictures/10000001000001F2000001C65927EABA.png" xlink:type="simple" xlink:show="embed" xlink:actuate="onLoad" draw:mime-type="image/png"/></draw:frame><text:s text:c="2"/><draw:frame draw:style-name="fr2" draw:name="Image4" text:anchor-type="char" svg:x="8.544cm" svg:y="0.397cm" svg:width="5.574cm" svg:height="6.26cm" draw:z-index="3"><draw:image xlink:href="Pictures/10000001000001F800000236B09A7259.png" xlink:type="simple" xlink:show="embed" xlink:actuate="onLoad" draw:mime-type="image/png"/></draw:frame></text:p>
      <text:p text:style-name="P13"><draw:frame draw:style-name="fr1" draw:name="Image3" text:anchor-type="as-char" svg:width="17.436cm" svg:height="5.927cm" draw:z-index="2"><draw:image xlink:href="Pictures/10000001000003DC000001509C8A3A05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8:36:03.658058100</meta:creation-date>
    <dc:date>2026-05-05T18:40:07.087658100</dc:date>
    <meta:editing-duration>PT4M3S</meta:editing-duration>
    <meta:editing-cycles>1</meta:editing-cycles>
    <meta:document-statistic meta:table-count="0" meta:image-count="4" meta:object-count="0" meta:page-count="2" meta:paragraph-count="40" meta:word-count="291" meta:character-count="1749" meta:non-whitespace-character-count="1510"/>
    <meta:generator>LibreOffice/25.8.5.2$Windows_X86_64 LibreOffice_project/9c8b85f387cc00a89945a79c9e6239f32e450ac2</meta:generator>
  </office:meta>
</office:document-meta>
</file>