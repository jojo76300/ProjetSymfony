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270000023232F20499.png" manifest:media-type="image/png"/>
  <manifest:file-entry manifest:full-path="Pictures/1000000100000250000002AEB41D9904.png" manifest:media-type="image/png"/>
  <manifest:file-entry manifest:full-path="Pictures/10000001000002A3000002C2D55010A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00%" fo:text-indent="0cm" style:auto-text-indent="false" fo:padding="0cm" fo:border="non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4" style:family="paragraph" style:parent-style-name="Text_20_body" style:list-style-name="L1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7" style:family="paragraph" style:parent-style-name="Text_20_body" style:list-style-name="L4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8" style:family="paragraph" style:parent-style-name="Text_20_body" style:list-style-name="L5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9" style:family="paragraph" style:parent-style-name="Text_20_body" style:list-style-name="L6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0" style:family="paragraph" style:parent-style-name="Text_20_body" style:list-style-name="L7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1" style:family="paragraph" style:parent-style-name="Text_20_body" style:list-style-name="L8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2" style:family="paragraph" style:parent-style-name="Text_20_body" style:list-style-name="L9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3" style:family="paragraph" style:parent-style-name="Text_20_body" style:list-style-name="L10">
      <style:paragraph-properties fo:margin-left="0cm" fo:margin-right="0cm" fo:line-height="100%" fo:text-indent="0cm" style:auto-text-indent="false" fo:padding="0cm" fo:border="none"/>
      <style:text-properties fo:font-size="12pt" style:font-size-asian="12pt" style:font-size-complex="12pt"/>
    </style:style>
    <style:style style:name="P14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uc03--grer-les-entreprises-crud"/>UC‑03 – Gérer les entreprises (CRUD)</text:h>
      <text:h text:style-name="P2" text:outline-level="2"><text:bookmark text:name="1-identification"/>1. Identification</text:h>
      <text:p text:style-name="P3">UC‑ID : UC‑03<text:line-break/>Nom : Gérer les entreprises<text:line-break/>Version : 1.0<text:line-break/>Date : 05/05/2026<text:line-break/>Auteur(s) : Jordan K.</text:p>
      <text:h text:style-name="P2" text:outline-level="2"><text:bookmark text:name="2-contexte"/>2. Contexte</text:h>
      <text:p text:style-name="P3">Acteur principal : Administrateur<text:line-break/>Objectif : Permettre la gestion des entreprises partenaires pour pouvoir associer chaque stage à une structure.<text:line-break/>Périmètre : Menu “Entreprises”.</text:p>
      <text:h text:style-name="P2" text:outline-level="2"><text:bookmark text:name="3-conditions"/>3. Conditions</text:h>
      <text:p text:style-name="P3">Préconditions :</text:p>
      <text:list text:style-name="L1">
        <text:list-item>
          <text:p text:style-name="P4">Utilisateur connecté en tant qu’Admin.</text:p>
        </text:list-item>
      </text:list>
      <text:p text:style-name="P3">Déclencheur :</text:p>
      <text:list text:style-name="L2">
        <text:list-item>
          <text:p text:style-name="P5">L’admin clique sur “Entreprises” puis sur “Ajouter”, “Modifier” ou “Supprimer”.</text:p>
        </text:list-item>
      </text:list>
      <text:p text:style-name="P3">Postconditions (succès) :</text:p>
      <text:list text:style-name="L3">
        <text:list-item>
          <text:p text:style-name="P6">L’entreprise est créée/modifiée/supprimée en base.</text:p>
        </text:list-item>
      </text:list>
      <text:p text:style-name="P3">Postconditions (échec) :</text:p>
      <text:list text:style-name="L4">
        <text:list-item>
          <text:p text:style-name="P7">Les changements ne sont pas enregistrés; message d’erreur.</text:p>
        </text:list-item>
      </text:list>
      <text:h text:style-name="P2" text:outline-level="2"><text:bookmark text:name="4-donnes--rgles-de-gestion"/>4. Données &amp; règles de gestion</text:h>
      <text:p text:style-name="P3">Données manipulées :</text:p>
      <text:list text:style-name="L5">
        <text:list-item>
          <text:p text:style-name="P8">nom</text:p>
        </text:list-item>
        <text:list-item>
          <text:p text:style-name="P8">ville</text:p>
        </text:list-item>
        <text:list-item>
          <text:p text:style-name="P8">secteur</text:p>
        </text:list-item>
        <text:list-item>
          <text:p text:style-name="P8">contact (nom du contact)</text:p>
        </text:list-item>
        <text:list-item>
          <text:p text:style-name="P8">email</text:p>
        </text:list-item>
      </text:list>
      <text:p text:style-name="P3">Règles de gestion :</text:p>
      <text:list text:style-name="L6">
        <text:list-item>
          <text:p text:style-name="P9">R1 : Nom, ville, email sont obligatoires.</text:p>
        </text:list-item>
        <text:list-item>
          <text:p text:style-name="P9">R2 : L’email doit être au format valide.</text:p>
        </text:list-item>
        <text:list-item>
          <text:p text:style-name="P9">R3 : Optionnel : empêcher la suppression d’une entreprise déjà liée à des stages (ou demander une confirmation explicite).</text:p>
        </text:list-item>
      </text:list>
      <text:h text:style-name="P2" text:outline-level="2"><text:bookmark text:name="5-scnarios"/>5. Scénarios</text:h>
      <text:p text:style-name="P3">Scénario nominal – Ajout :</text:p>
      <text:list text:style-name="L7">
        <text:list-item>
          <text:p text:style-name="P10">L’admin clique sur “Entreprises” &gt; “Ajouter”.</text:p>
        </text:list-item>
        <text:list-item>
          <text:p text:style-name="P10">Le système affiche le formulaire d’ajout (même design que l’ajout étudiant).</text:p>
        </text:list-item>
        <text:list-item>
          <text:p text:style-name="P10"><text:soft-page-break/>L’admin saisit les champs requis.</text:p>
        </text:list-item>
        <text:list-item>
          <text:p text:style-name="P10">Il enregistre.</text:p>
        </text:list-item>
        <text:list-item>
          <text:p text:style-name="P10">Le système valide, crée l’entreprise et met à jour la liste.</text:p>
        </text:list-item>
      </text:list>
      <text:p text:style-name="P3">Scénario nominal – Modification :</text:p>
      <text:list text:style-name="L8">
        <text:list-item>
          <text:p text:style-name="P11">L’admin sélectionne une entreprise dans la liste.</text:p>
        </text:list-item>
        <text:list-item>
          <text:p text:style-name="P11">Il clique sur “Modifier”.</text:p>
        </text:list-item>
        <text:list-item>
          <text:p text:style-name="P11">Il adapte les informations et enregistre.</text:p>
        </text:list-item>
        <text:list-item>
          <text:p text:style-name="P11">Le système met à jour la fiche entreprise.</text:p>
        </text:list-item>
      </text:list>
      <text:p text:style-name="P3">Scénarios alternatifs :</text:p>
      <text:list text:style-name="L9">
        <text:list-item>
          <text:p text:style-name="P12">A1 : L’admin tente de supprimer une entreprise liée à des stages → message d’avertissement “Cette entreprise est utilisée dans des stages”.</text:p>
        </text:list-item>
      </text:list>
      <text:p text:style-name="P3">Exceptions / erreurs :</text:p>
      <text:list text:style-name="L10">
        <text:list-item>
          <text:p text:style-name="P13">E1 : Email invalide → message d’erreur, pas d’enregistrement.</text:p>
        </text:list-item>
        <text:list-item>
          <text:p text:style-name="P13">E2 : Erreur BDD → message générique.</text:p>
        </text:list-item>
      </text:list>
      <text:h text:style-name="P2" text:outline-level="2"><text:bookmark text:name="7-maquettes-associes"/>7. Maquettes associées</text:h>
      <text:p text:style-name="P14"><draw:frame draw:style-name="fr1" draw:name="Image1" text:anchor-type="char" svg:x="0cm" svg:y="0.125cm" svg:width="17cm" svg:height="6.066cm" draw:z-index="0"><draw:image xlink:href="Pictures/10000001000006270000023232F20499.png" xlink:type="simple" xlink:show="embed" xlink:actuate="onLoad" draw:mime-type="image/png"/></draw:frame></text:p>
      <text:p text:style-name="P14"><draw:frame draw:style-name="fr1" draw:name="Image2" text:anchor-type="char" svg:x="0.448cm" svg:y="0cm" svg:width="7.267cm" svg:height="8.421cm" draw:z-index="1"><draw:image xlink:href="Pictures/1000000100000250000002AEB41D9904.png" xlink:type="simple" xlink:show="embed" xlink:actuate="onLoad" draw:mime-type="image/png"/></draw:frame><draw:frame draw:style-name="fr1" draw:name="Image3" text:anchor-type="char" svg:x="8.932cm" svg:y="0.132cm" svg:width="8.133cm" svg:height="8.505cm" draw:z-index="2"><draw:image xlink:href="Pictures/10000001000002A3000002C2D55010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0:53:48.510774500</meta:creation-date>
    <dc:date>2026-05-05T18:33:34.596982800</dc:date>
    <meta:editing-duration>PT32M13S</meta:editing-duration>
    <meta:editing-cycles>2</meta:editing-cycles>
    <meta:generator>LibreOffice/25.8.5.2$Windows_X86_64 LibreOffice_project/9c8b85f387cc00a89945a79c9e6239f32e450ac2</meta:generator>
    <meta:document-statistic meta:table-count="0" meta:image-count="3" meta:object-count="0" meta:page-count="2" meta:paragraph-count="43" meta:word-count="288" meta:character-count="1759" meta:non-whitespace-character-count="1535"/>
  </office:meta>
</office:document-meta>
</file>