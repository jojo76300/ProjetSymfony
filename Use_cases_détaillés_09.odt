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9--exporter-en-csvexcel"/>UC‑09 – Exporter en CSV/Excel</text:h>
      <text:h text:style-name="P2" text:outline-level="2"><text:bookmark text:name="1-identification"/>1. Identification</text:h>
      <text:p text:style-name="P3">UC‑ID : UC‑09<text:line-break/>Nom : Exporter la liste des stages en CSV/Excel<text:line-break/>Version : 1.0<text:line-break/>Date : 05/05/2026<text:line-break/>Auteur(s) : Jordan K.</text:p>
      <text:h text:style-name="P2" text:outline-level="2"><text:bookmark text:name="2-contexte"/>2. Contexte</text:h>
      <text:p text:style-name="P3">Acteur principal : Administrateur<text:line-break/>Objectif : Permettre l’export des données de stage pour traitement externe (direction, secrétariat, etc.).<text:line-break/>Périmètre : Bouton “Exports” ou action sur la vue Suivi &amp; Visites.</text:p>
      <text:h text:style-name="P2" text:outline-level="2"><text:bookmark text:name="3-conditions"/>3. Conditions</text:h>
      <text:p text:style-name="P3">Préconditions :</text:p>
      <text:list text:style-name="L1">
        <text:list-item>
          <text:p text:style-name="P4">Admin connecté.</text:p>
        </text:list-item>
        <text:list-item>
          <text:p text:style-name="P4">Des données à exporter sont disponibles (éventuellement filtrées).</text:p>
        </text:list-item>
      </text:list>
      <text:p text:style-name="P3">Déclencheur :</text:p>
      <text:list text:style-name="L2">
        <text:list-item>
          <text:p text:style-name="P5">Clic sur le bouton “Export CSV” ou “Exports”.</text:p>
        </text:list-item>
      </text:list>
      <text:p text:style-name="P3">Postconditions (succès) :</text:p>
      <text:list text:style-name="L3">
        <text:list-item>
          <text:p text:style-name="P6">Fichier CSV généré et téléchargé côté navigateur.</text:p>
        </text:list-item>
      </text:list>
      <text:p text:style-name="P3">Postconditions (échec) :</text:p>
      <text:list text:style-name="L4">
        <text:list-item>
          <text:p text:style-name="P7">Message d’erreur; aucun fichier généré.</text:p>
        </text:list-item>
      </text:list>
      <text:h text:style-name="P2" text:outline-level="2"><text:bookmark text:name="4-donnes--rgles-de-gestion"/>4. Données &amp; règles de gestion</text:h>
      <text:p text:style-name="P3">Données manipulées :</text:p>
      <text:list text:style-name="L5">
        <text:list-item>
          <text:p text:style-name="P8">Liste actuelle des stages (après application des filtres).</text:p>
        </text:list-item>
      </text:list>
      <text:p text:style-name="P3">Règles de gestion :</text:p>
      <text:list text:style-name="L6">
        <text:list-item>
          <text:p text:style-name="P9">R1 : L’export respecte les filtres actifs.</text:p>
        </text:list-item>
        <text:list-item>
          <text:p text:style-name="P10"><text:span text:style-name="T1">R2 : Format CSV compatible Excel (séparateur </text:span><text:span text:style-name="Source_20_Text"><text:span text:style-name="T2">;</text:span></text:span><text:span text:style-name="T1">, BOM UTF‑8 pour les accents).</text:span></text:p>
        </text:list-item>
      </text:list>
      <text:h text:style-name="P2" text:outline-level="2"><text:bookmark text:name="5-scnarios"/>5. Scénarios</text:h>
      <text:p text:style-name="P3">Scénario nominal :</text:p>
      <text:list text:style-name="L7">
        <text:list-item>
          <text:p text:style-name="P11">L’Admin ouvre la vue Suivi &amp; Visites.</text:p>
        </text:list-item>
        <text:list-item>
          <text:p text:style-name="P11">Il applique les filtres désirés.</text:p>
        </text:list-item>
        <text:list-item>
          <text:p text:style-name="P11">Il clique sur “Export CSV”.</text:p>
        </text:list-item>
        <text:list-item>
          <text:p text:style-name="P11">Le système prépare un fichier CSV avec les colonnes définies (ID, étudiant, entreprise, dates, profs, statuts…).</text:p>
        </text:list-item>
        <text:list-item>
          <text:p text:style-name="P11"><text:soft-page-break/>Le navigateur télécharge le fichier.</text:p>
        </text:list-item>
      </text:list>
      <text:p text:style-name="P3">Exceptions / erreurs :</text:p>
      <text:list text:style-name="L8">
        <text:list-item>
          <text:p text:style-name="P12">E1 : Aucun stage à exporter → message “Aucune donnée à exporter”.</text:p>
        </text:list-item>
        <text:list-item>
          <text:p text:style-name="P12">E2 : Erreur IO/BDD → message d’erreur.</text:p>
        </text:list-item>
      </text:list>
      <text:h text:style-name="P2" text:outline-level="2"><text:bookmark text:name="7-maquettes-associes"/>7. Maquettes associées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8:42:35.426675400</meta:creation-date>
    <dc:date>2026-05-05T18:45:12.889152300</dc:date>
    <meta:editing-duration>PT2M37S</meta:editing-duration>
    <meta:editing-cycles>1</meta:editing-cycles>
    <meta:document-statistic meta:table-count="0" meta:image-count="0" meta:object-count="0" meta:page-count="2" meta:paragraph-count="32" meta:word-count="227" meta:character-count="1369" meta:non-whitespace-character-count="1188"/>
    <meta:generator>LibreOffice/25.8.5.2$Windows_X86_64 LibreOffice_project/9c8b85f387cc00a89945a79c9e6239f32e450ac2</meta:generator>
  </office:meta>
</office:document-meta>
</file>